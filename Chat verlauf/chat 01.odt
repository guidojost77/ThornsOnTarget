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KT: Thorns On Target / ASAT-Webseite</text:p>
      <text:p text:style-name="Standard"/>
      <text:p text:style-name="Standard">Aktueller Stand:</text:p>
      <text:p text:style-name="Standard">- Projekt läuft in VS Code.</text:p>
      <text:p text:style-name="Standard">- Live Server funktioniert über:</text:p>
      <text:p text:style-name="Standard"><text:s text:c="2"/>http://127.0.0.1:5500/index.html</text:p>
      <text:p text:style-name="Standard">- Dateien:</text:p>
      <text:p text:style-name="Standard"><text:s text:c="2"/>index.html</text:p>
      <text:p text:style-name="Standard"><text:s text:c="2"/>style.css</text:p>
      <text:p text:style-name="Standard"><text:s text:c="2"/>script.js</text:p>
      <text:p text:style-name="Standard">- Bilderordner:</text:p>
      <text:p text:style-name="Standard"><text:s text:c="2"/>Bilder/images/</text:p>
      <text:p text:style-name="Standard">- Logo:</text:p>
      <text:p text:style-name="Standard"><text:s text:c="2"/>Bilder/images/tot-logo.png</text:p>
      <text:p text:style-name="Standard">- Hero-Bild:</text:p>
      <text:p text:style-name="Standard"><text:s text:c="2"/>Bilder/images/111.png</text:p>
      <text:p text:style-name="Standard">- Das Hero-Bild ist jetzt korrekt als PNG mit transparentem Hintergrund eingebunden.</text:p>
      <text:p text:style-name="Standard">- Der weiße Kasten um das Bild wurde gelöst.</text:p>
      <text:p text:style-name="Standard">- Bild zeigt ASAT &amp; Jacqueline im Kreis.</text:p>
      <text:p text:style-name="Standard">- Schwarzer/Goldener Premium-Stil ist aktiv.</text:p>
      <text:p text:style-name="Standard"/>
      <text:p text:style-name="Standard">Aktueller Seitenaufbau:</text:p>
      <text:p text:style-name="Standard">- Header mit Logo links und Navigation rechts:</text:p>
      <text:p text:style-name="Standard"><text:s text:c="2"/>Startseite, Über uns, Kurse, Long Range, Sponsoren, Kontakt</text:p>
      <text:p text:style-name="Standard">- Hero-Bereich:</text:p>
      <text:p text:style-name="Standard"><text:s text:c="2"/>links Text</text:p>
      <text:p text:style-name="Standard"><text:s text:c="2"/>rechts rundes Bild mit Gold-Glow</text:p>
      <text:p text:style-name="Standard">- Unterhalb: vier Hex-Karten:</text:p>
      <text:p text:style-name="Standard"><text:s text:c="2"/>Long Range</text:p>
      <text:p text:style-name="Standard"><text:s text:c="2"/>Dynamisches Schießen</text:p>
      <text:p text:style-name="Standard"><text:s text:c="2"/>Wettkampftraining</text:p>
      <text:p text:style-name="Standard"><text:s text:c="2"/>Sachkunde &amp; Sicherheit</text:p>
      <text:p text:style-name="Standard">- Weitere Bereiche vorbereitet:</text:p>
      <text:p text:style-name="Standard"><text:s text:c="2"/>Über uns</text:p>
      <text:p text:style-name="Standard"><text:s text:c="2"/>Kurse</text:p>
      <text:p text:style-name="Standard"><text:s text:c="2"/>Long Range</text:p>
      <text:p text:style-name="Standard"><text:s text:c="2"/>Sponsoren</text:p>
      <text:p text:style-name="Standard"><text:s text:c="2"/>Footer</text:p>
      <text:p text:style-name="Standard"/>
      <text:p text:style-name="Standard">Aktuelles Problem:</text:p>
      <text:p text:style-name="Standard">- Der linke Hero-Text gefällt noch nicht.</text:p>
      <text:p text:style-name="Standard">- "THORNS ON TARGET" soll nebeneinander bzw. sauberer stehen.</text:p>
      <text:p text:style-name="Standard">- Aktuell wird es optisch noch untereinander dargestellt.</text:p>
      <text:p text:style-name="Standard">- Die Suche nach CSS-Klassen war verwirrend, weil im Code teils andere Klassen/Namen verwendet wurden als in den Anweisungen.</text:p>
      <text:p text:style-name="Standard">- Ab jetzt keine einzelnen Such-Hinweise mehr ohne kompletten, passenden Code.</text:p>
      <text:p text:style-name="Standard">- Besser: komplette index.html und style.css neu liefern oder exakt anhand des sichtbaren Codes arbeiten.</text:p>
      <text:p text:style-name="Standard"/>
      <text:p text:style-name="Standard">Wichtige Nutzerwünsche:</text:p>
      <text:p text:style-name="Standard">- Keine Bildgenerierung mehr ohne ausdrückliche Freigabe.</text:p>
      <text:p text:style-name="Standard">- Bei Bildern erst antworten, nicht automatisch bearbeiten/generieren.</text:p>
      <text:p text:style-name="Standard"><text:soft-page-break/>- Personenbilder sollen nicht KI-neu erzeugt werden.</text:p>
      <text:p text:style-name="Standard">- ASAT und Jacqueline dürfen nicht verändert werden.</text:p>
      <text:p text:style-name="Standard">- Für echte Fotos: klassische Bearbeitung, keine KI-Neugenerierung.</text:p>
      <text:p text:style-name="Standard">- Code am besten komplett und ersetzbar liefern, nicht nur Schnipsel.</text:p>
      <text:p text:style-name="Standard">- Klare Anweisung: "Ersetze komplette Datei" oder "ersetze diesen exakten Block".</text:p>
      <text:p text:style-name="Standard">- Nutzer möchte nicht durch 400+ Zeilen suchen müssen.</text:p>
      <text:p text:style-name="Standard"/>
      <text:p text:style-name="Standard">Nächster sinnvoller Schritt:</text:p>
      <text:p text:style-name="Standard">1. Kompletten aktuellen Code nochmal sauber neu aufbauen.</text:p>
      <text:p text:style-name="Standard">2. In index.html eindeutige Klassen verwenden:</text:p>
      <text:p text:style-name="Standard"><text:s text:c="3"/>hero-title</text:p>
      <text:p text:style-name="Standard"><text:s text:c="3"/>hero-title-main</text:p>
      <text:p text:style-name="Standard"><text:s text:c="3"/>hero-title-gold</text:p>
      <text:p text:style-name="Standard"><text:s text:c="3"/>hero-subtitle</text:p>
      <text:p text:style-name="Standard"><text:s text:c="3"/>hero-text</text:p>
      <text:p text:style-name="Standard"><text:s text:c="3"/>hero-stats</text:p>
      <text:p text:style-name="Standard"><text:s text:c="3"/>hero-image</text:p>
      <text:p text:style-name="Standard">3. In style.css exakt dieselben Klassen verwenden.</text:p>
      <text:p text:style-name="Standard">4. Überschrift so bauen, dass sie klar steuerbar ist:</text:p>
      <text:p text:style-name="Standard"><text:s text:c="3"/>THORNS ON TARGET entweder in einer Zeile oder bewusst mit kontrolliertem Umbruch.</text:p>
      <text:p text:style-name="Standard">5. Danach Screenshot prüfen und nur noch gezielt anpassen.</text:p>
      <text:p text:style-name="Standard"/>
      <text:p text:style-name="Standard">Aktuelle Datei-Pfade, die wichtig sind:</text:p>
      <text:p text:style-name="Standard">- Logo:</text:p>
      <text:p text:style-name="Standard"><text:s text:c="2"/>Bilder/images/tot-logo.png</text:p>
      <text:p text:style-name="Standard">- Hero-Bild:</text:p>
      <text:p text:style-name="Standard"><text:s text:c="2"/>Bilder/images/111.png</text:p>
      <text:p text:style-name="Standard"/>
      <text:p text:style-name="Standard">Merksatz für Fortsetzung:</text:p>
      <text:p text:style-name="Standard">"Wir arbeiten an der Thorns-On-Target-Startseite weiter. Bitte keine Bildgenerierung. Bitte kompletten HTML- und CSS-Code passend neu erstellen. Aktuelles Problem: Hero-Text/Überschrift links wirkt nicht professionell, und THORNS ON TARGET soll sauber nebeneinander bzw. kontrolliert dargestellt werden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do Graf-Jost</meta:initial-creator>
    <meta:creation-date>2026-06-15T17:59:07.16</meta:creation-date>
    <meta:document-statistic meta:table-count="0" meta:image-count="0" meta:object-count="0" meta:page-count="2" meta:paragraph-count="73" meta:word-count="370" meta:character-count="2810"/>
    <dc:date>2026-06-15T17:59:36.99</dc:date>
    <dc:creator>Guido Graf-Jost</dc:creator>
    <meta:editing-duration>PT31S</meta:editing-duration>
    <meta:editing-cycles>1</meta:editing-cycles>
    <meta:generator>OpenOffice/4.1.16$Win32 OpenOffice.org_project/4116m3$Build-9816</meta:generator>
  </office:meta>
</office:document-meta>
</file>