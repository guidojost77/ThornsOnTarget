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 style:list-style-name="L2">
      <style:paragraph-properties fo:margin-top="0cm" fo:margin-bottom="0cm"/>
    </style:style>
    <style:style style:name="P19" style:family="paragraph" style:parent-style-name="Preformatted_20_Text">
      <style:paragraph-properties fo:margin-top="0cm" fo:margin-bottom="0.499cm"/>
    </style:style>
    <style:style style:name="P20" style:family="paragraph">
      <style:paragraph-properties fo:text-align="start"/>
      <style:text-properties style:font-name="Courier New" fo:font-size="10pt"/>
    </style:style>
    <style:style style:name="P21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atürlich. Und ich mache ihn diesmal so, dass wir morgen wirklich <text:span text:style-name="Strong_20_Emphasis">nahtlos</text:span> weitermachen können. Ich schreibe bewusst auch die Dinge hinein, die wir heute gelernt und entschieden haben, damit wir keine Zeit verlieren.</text:p>
      <text:section text:style-name="Sect1" text:name="thread">
        <text:p text:style-name="Horizontal_20_Line"/>
        <text:h text:style-name="Heading_20_1" text:outline-level="1">CHATVERLAUF – THORNS ON TARGET</text:h>
        <text:h text:style-name="Heading_20_2" text:outline-level="2">Projektstand: Ende des heutigen Arbeitstages</text:h>
        <text:h text:style-name="Heading_20_3" text:outline-level="3">Projekt</text:h>
        <text:p text:style-name="Text_20_body"><text:span text:style-name="Strong_20_Emphasis">Thorns On Target – Offizielle Webseite</text:span></text:p>
        <text:p text:style-name="Text_20_body">Aktueller Stand:</text:p>
        <text:list xml:id="list8215868395999529245" text:style-name="L1">
          <text:list-item>
            <text:p text:style-name="P17">GitHub Repository wurde erstellt. </text:p>
          </text:list-item>
          <text:list-item>
            <text:p text:style-name="P17">GitHub Pages funktioniert grundsätzlich. </text:p>
          </text:list-item>
          <text:list-item>
            <text:p text:style-name="P17">VS Code ist eingerichtet. </text:p>
          </text:list-item>
          <text:list-item>
            <text:p text:style-name="P17">Live Server läuft (Port 5500). </text:p>
          </text:list-item>
          <text:list-item>
            <text:p text:style-name="P17">Webseite wird lokal korrekt angezeigt. </text:p>
          </text:list-item>
          <text:list-item>
            <text:p text:style-name="P1">Startseite ist als aktueller Grundbaustein akzeptiert. </text:p>
          </text:list-item>
        </text:list>
        <text:p text:style-name="Horizontal_20_Line"/>
        <text:h text:style-name="Heading_20_1" text:outline-level="1">WICHTIGE REGELN FÜR DAS GESAMTE PROJEKT</text:h>
        <text:p text:style-name="Text_20_body">Diese Regeln gelten dauerhaft.</text:p>
        <text:h text:style-name="Heading_20_2" text:outline-level="2">Design</text:h>
        <text:p text:style-name="Text_20_body">Die komplette Webseite soll denselben Stil behalten.</text:p>
        <text:p text:style-name="Text_20_body">Schwarz.</text:p>
        <text:p text:style-name="Text_20_body">Gold.</text:p>
        <text:p text:style-name="Text_20_body">Dunkelrot.</text:p>
        <text:p text:style-name="Text_20_body">Goldene Lichtverläufe.</text:p>
        <text:p text:style-name="Text_20_body">Futuristische Linien.</text:p>
        <text:p text:style-name="Text_20_body">Feine Waben-/Rautenstruktur.</text:p>
        <text:p text:style-name="Text_20_body">Leichte Gold-Glows.</text:p>
        <text:p text:style-name="Text_20_body">Elegante Animationen.</text:p>
        <text:p text:style-name="Text_20_body">Premium-Look.</text:p>
        <text:p text:style-name="Text_20_body">Nicht verspielt.</text:p>
        <text:p text:style-name="Text_20_body">Nicht überladen.</text:p>
        <text:p text:style-name="Text_20_body">Jede Unterseite muss sofort als <text:span text:style-name="Strong_20_Emphasis">Thorns On Target</text:span> erkennbar sein.</text:p>
        <text:p text:style-name="Horizontal_20_Line"><text:soft-page-break/></text:p>
        <text:h text:style-name="Heading_20_2" text:outline-level="2">Arbeitsweise</text:h>
        <text:p text:style-name="Text_20_body">Guido möchte <text:span text:style-name="Strong_20_Emphasis">keine Code-Schnipsel</text:span>.</text:p>
        <text:p text:style-name="Text_20_body">Immer komplette Dateien.</text:p>
        <text:p text:style-name="Text_20_body">Wenn Änderungen erfolgen:</text:p>
        <text:list xml:id="list6653833154513956513" text:style-name="L2">
          <text:list-item>
            <text:p text:style-name="P18">komplette index.html </text:p>
          </text:list-item>
          <text:list-item>
            <text:p text:style-name="P18">komplette ueber-uns.html </text:p>
          </text:list-item>
          <text:list-item>
            <text:p text:style-name="P18">komplette style.css </text:p>
          </text:list-item>
          <text:list-item>
            <text:p text:style-name="P2">komplette script.js </text:p>
          </text:list-item>
        </text:list>
        <text:p text:style-name="Text_20_body">Keine Anleitungen wie</text:p>
        <text:p text:style-name="Quotations">"Lösche Zeile 54"</text:p>
        <text:p text:style-name="Text_20_body">sondern komplette Dateien.</text:p>
        <text:p text:style-name="Horizontal_20_Line"/>
        <text:h text:style-name="Heading_20_2" text:outline-level="2">Aktueller Projektordner</text:h>
        <text:p text:style-name="Text_20_body">Momentan:</text:p>
        <text:section text:style-name="Sect2" text:name="code-block-viewer">
          <text:p text:style-name="Preformatted_20_Text"><text:span text:style-name="Source_20_Text">Asat/</text:span></text:p>
          <text:p text:style-name="Preformatted_20_Text"><text:span text:style-name="Source_20_Text">index.html</text:span></text:p>
          <text:p text:style-name="Preformatted_20_Text"><text:span text:style-name="Source_20_Text">ueber-uns.html</text:span></text:p>
          <text:p text:style-name="Preformatted_20_Text"><text:span text:style-name="Source_20_Text">style.css</text:span></text:p>
          <text:p text:style-name="Preformatted_20_Text"><text:span text:style-name="Source_20_Text">script.js</text:span></text:p>
          <text:p text:style-name="Preformatted_20_Text"><text:span text:style-name="Source_20_Text">Bilder/</text:span></text:p>
          <text:p text:style-name="P19"><text:span text:style-name="Source_20_Text">Chatverlauf/</text:span></text:p>
        </text:section>
        <text:p text:style-name="Horizontal_20_Line"/>
        <text:h text:style-name="Heading_20_2" text:outline-level="2">GitHub</text:h>
        <text:p text:style-name="Text_20_body">Repository:</text:p>
        <text:p text:style-name="Text_20_body">ThornsOnTarget</text:p>
        <text:p text:style-name="Text_20_body">GitHub Pages funktioniert.</text:p>
        <text:p text:style-name="Text_20_body">ABER:</text:p>
        <text:p text:style-name="Text_20_body">GitHub veröffentlicht momentan nur</text:p>
        <text:p text:style-name="Text_20_body">README.md</text:p>
        <text:p text:style-name="Text_20_body">Deshalb erscheint online lediglich</text:p>
        <text:p text:style-name="Text_20_body">ThornsOnTarget</text:p>
        <text:p text:style-name="Text_20_body">Offizielle Webseite der Thorns On Target Academy</text:p>
        <text:p text:style-name="Text_20_body">Die eigentliche Webseite liegt im Ordner</text:p>
        <text:p text:style-name="Text_20_body">Asat/</text:p>
        <text:p text:style-name="Text_20_body">Dadurch findet GitHub die index.html nicht.</text:p>
        <text:p text:style-name="Horizontal_20_Line"><text:soft-page-break/></text:p>
        <text:h text:style-name="Heading_20_2" text:outline-level="2">Nächster technischer Schritt</text:h>
        <text:p text:style-name="Text_20_body">VS Code direkt mit GitHub verbinden.</text:p>
        <text:p text:style-name="Text_20_body">Aktueller Stand:</text:p>
        <text:p text:style-name="Text_20_body">VS Code ist <text:span text:style-name="Strong_20_Emphasis">noch nicht angemeldet</text:span>.</text:p>
        <text:p text:style-name="Text_20_body">Oben rechts steht:</text:p>
        <text:p text:style-name="Text_20_body"><text:span text:style-name="Strong_20_Emphasis">Anmelden</text:span></text:p>
        <text:p text:style-name="Text_20_body">Morgen:</text:p>
        <text:list xml:id="list8261474930569573823" text:style-name="L3">
          <text:list-item>
            <text:p text:style-name="P3"/>
          </text:list-item>
        </text:list>
        <text:p text:style-name="Text_20_body">In VS Code</text:p>
        <text:p text:style-name="Text_20_body">oben rechts</text:p>
        <text:p text:style-name="Text_20_body">Anmelden</text:p>
        <text:list xml:id="list4021367714284717377" text:style-name="L4">
          <text:list-item>
            <text:p text:style-name="P4"/>
          </text:list-item>
        </text:list>
        <text:p text:style-name="Text_20_body">Mit GitHub anmelden</text:p>
        <text:list xml:id="list3246727777165389864" text:style-name="L5">
          <text:list-item>
            <text:p text:style-name="P5"/>
          </text:list-item>
        </text:list>
        <text:p text:style-name="Text_20_body">GitHub autorisieren</text:p>
        <text:list xml:id="list4695896180565682067" text:style-name="L6">
          <text:list-item>
            <text:p text:style-name="P6"/>
          </text:list-item>
        </text:list>
        <text:p text:style-name="Text_20_body">Danach Projekt sauber synchronisieren.</text:p>
        <text:p text:style-name="Text_20_body">Ziel:</text:p>
        <text:p text:style-name="Text_20_body">Nie wieder Dateien per Browser hochladen.</text:p>
        <text:p text:style-name="Text_20_body">Alles direkt aus VS Code veröffentlichen.</text:p>
        <text:p text:style-name="Horizontal_20_Line"/>
        <text:h text:style-name="Heading_20_1" text:outline-level="1">STARTSEITE</text:h>
        <text:p text:style-name="Text_20_body">Die Startseite bleibt vorerst bestehen.</text:p>
        <text:p text:style-name="Text_20_body">Sie gefällt.</text:p>
        <text:p text:style-name="Text_20_body">Sie bildet künftig den Designstandard.</text:p>
        <text:p text:style-name="Text_20_body">An dieser Seite wird momentan nichts geändert.</text:p>
        <text:p text:style-name="Horizontal_20_Line"/>
        <text:h text:style-name="Heading_20_1" text:outline-level="1">ÜBER-UNS-SEITE</text:h>
        <text:p text:style-name="Text_20_body">Aktuell begonnen.</text:p>
        <text:p text:style-name="Text_20_body">Datei:</text:p>
        <text:section text:style-name="Sect2" text:name="Bereich1">
          <text:p text:style-name="P19"><text:bookmark text:name="code-block-viewer"/><text:span text:style-name="Source_20_Text">ueber-uns.html</text:span></text:p>
        </text:section>
        <text:p text:style-name="Text_20_body"><text:soft-page-break/>existiert bereits.</text:p>
        <text:p text:style-name="Horizontal_20_Line"/>
        <text:h text:style-name="Heading_20_2" text:outline-level="2">Aufbau</text:h>
        <text:p text:style-name="Text_20_body">Links:</text:p>
        <text:p text:style-name="Text_20_body">Großer Platzhalter</text:p>
        <text:p text:style-name="Text_20_body">Foto Jacqueline</text:p>
        <text:p text:style-name="Text_20_body">(später freigestelltes PNG)</text:p>
        <text:p text:style-name="Horizontal_20_Line"/>
        <text:p text:style-name="Text_20_body">Mitte:</text:p>
        <text:p text:style-name="Text_20_body">Großer Textblock</text:p>
        <text:p text:style-name="Text_20_body">Überschrift</text:p>
        <text:p text:style-name="Text_20_body">PRÄZISION IST KEIN ZUFALL.</text:p>
        <text:p text:style-name="Text_20_body">SIE IST ERLERNBAR.</text:p>
        <text:p text:style-name="Text_20_body">Danach:</text:p>
        <text:p text:style-name="Text_20_body">Vorstellung</text:p>
        <text:p text:style-name="Text_20_body">Vision</text:p>
        <text:p text:style-name="Text_20_body">Philosophie</text:p>
        <text:p text:style-name="Text_20_body">Akademie</text:p>
        <text:p text:style-name="Text_20_body">Mission</text:p>
        <text:p text:style-name="Horizontal_20_Line"/>
        <text:p text:style-name="Text_20_body">Rechts</text:p>
        <text:p text:style-name="Text_20_body">Großer Platzhalter</text:p>
        <text:p text:style-name="Text_20_body">Foto Asat</text:p>
        <text:p text:style-name="Text_20_body">(später freigestelltes PNG)</text:p>
        <text:p text:style-name="Horizontal_20_Line"/>
        <text:h text:style-name="Heading_20_2" text:outline-level="2">WICHTIG</text:h>
        <text:p text:style-name="Text_20_body">Die Schrift muss genauso hochwertig wirken wie auf der Startseite.</text:p>
        <text:p text:style-name="Text_20_body">Nicht zu riesig.</text:p>
        <text:p text:style-name="Text_20_body">Nicht plump.</text:p>
        <text:p text:style-name="Text_20_body">Goldene Akzente.</text:p>
        <text:p text:style-name="Text_20_body">Schöne Linien.</text:p>
        <text:p text:style-name="Text_20_body">Premium-Look.</text:p>
        <text:p text:style-name="Horizontal_20_Line"/>
        <text:h text:style-name="Heading_20_2" text:outline-level="2"><text:soft-page-break/>Philosophie</text:h>
        <text:p text:style-name="Text_20_body">Ganz wichtiger Bestandteil.</text:p>
        <text:p text:style-name="Text_20_body">Nicht die teuerste Ausrüstung gewinnt.</text:p>
        <text:p text:style-name="Text_20_body">Sondern</text:p>
        <text:p text:style-name="Text_20_body">Wissen</text:p>
        <text:p text:style-name="Text_20_body">Technik</text:p>
        <text:p text:style-name="Text_20_body">Training</text:p>
        <text:p text:style-name="Text_20_body">Analyse</text:p>
        <text:p text:style-name="Text_20_body">Disziplin.</text:p>
        <text:p text:style-name="Horizontal_20_Line"/>
        <text:h text:style-name="Heading_20_2" text:outline-level="2">Besonders hervorheben</text:h>
        <text:p text:style-name="Text_20_body">Asat schießt bewusst mit</text:p>
        <text:p text:style-name="Text_20_body">normaler Fabrikmunition.</text:p>
        <text:p text:style-name="Text_20_body">Keine selbstgeladene Matchmunition.</text:p>
        <text:p text:style-name="Text_20_body">Kein unbezahlbares Equipment.</text:p>
        <text:p text:style-name="Text_20_body">Er wollte beweisen,</text:p>
        <text:p text:style-name="Text_20_body">dass Präzision erlernbar ist.</text:p>
        <text:p text:style-name="Text_20_body">Dass Technik wichtiger ist</text:p>
        <text:p text:style-name="Text_20_body">als Geld.</text:p>
        <text:p text:style-name="Text_20_body">Er wurde dafür oft belächelt.</text:p>
        <text:p text:style-name="Text_20_body">Hat es trotzdem bewiesen.</text:p>
        <text:p text:style-name="Text_20_body">Das ist eine Kernbotschaft der gesamten Academy.</text:p>
        <text:p text:style-name="Text_20_body">Diese Philosophie zieht sich durch die komplette Webseite.</text:p>
        <text:p text:style-name="Horizontal_20_Line"/>
        <text:h text:style-name="Heading_20_1" text:outline-level="1">Europameister</text:h>
        <text:p text:style-name="Text_20_body">GANZ WICHTIG</text:p>
        <text:p text:style-name="Text_20_body">Im bisherigen Entwurf fehlte:</text:p>
        <text:p text:style-name="Text_20_body"><text:span text:style-name="Strong_20_Emphasis">Europameister</text:span></text:p>
        <text:p text:style-name="Text_20_body">Das darf nie wieder vergessen werden.</text:p>
        <text:p text:style-name="Text_20_body">Nicht</text:p>
        <text:p text:style-name="Text_20_body">"internationale Erfahrung"</text:p>
        <text:p text:style-name="Text_20_body">Nicht</text:p>
        <text:p text:style-name="Text_20_body">"Europa Cup"</text:p>
        <text:p text:style-name="Text_20_body">Nicht</text:p>
        <text:p text:style-name="Text_20_body"><text:soft-page-break/>"Teamwertung"</text:p>
        <text:p text:style-name="Text_20_body">Sondern ausdrücklich:</text:p>
        <text:p text:style-name="Text_20_body"><text:span text:style-name="Strong_20_Emphasis">Europameister</text:span></text:p>
        <text:p text:style-name="Text_20_body">muss als eigener großer Erfolg genannt werden.</text:p>
        <text:p text:style-name="Text_20_body">Er soll optisch sogar hervorgehoben werden.</text:p>
        <text:p text:style-name="Horizontal_20_Line"/>
        <text:h text:style-name="Heading_20_1" text:outline-level="1">Erfolge</text:h>
        <text:p text:style-name="Text_20_body">Nicht nur Zahlen.</text:p>
        <text:p text:style-name="Text_20_body">Sondern emotional.</text:p>
        <text:p text:style-name="Text_20_body">Beispielsweise:</text:p>
        <text:p text:style-name="Text_20_body">Europameister</text:p>
        <text:p text:style-name="Text_20_body">Mehrfach Deutscher Meister</text:p>
        <text:p text:style-name="Text_20_body">Mehrfach Landesmeister</text:p>
        <text:p text:style-name="Text_20_body">Zahlreiche Podestplätze</text:p>
        <text:p text:style-name="Text_20_body">Top-5-Platzierungen</text:p>
        <text:p text:style-name="Text_20_body">Langjährige Wettkampferfahrung</text:p>
        <text:p text:style-name="Text_20_body">National und international.</text:p>
        <text:p text:style-name="Horizontal_20_Line"/>
        <text:h text:style-name="Heading_20_1" text:outline-level="1">Bilder</text:h>
        <text:p text:style-name="Text_20_body">Heute wurden zahlreiche Ergebnisse,</text:p>
        <text:p text:style-name="Text_20_body">Fotos,</text:p>
        <text:p text:style-name="Text_20_body">Urkunden</text:p>
        <text:p text:style-name="Text_20_body">und Academy-Konzepte besprochen.</text:p>
        <text:p text:style-name="Text_20_body">Diese dienen als Grundlage.</text:p>
        <text:p text:style-name="Text_20_body">Später werden:</text:p>
        <text:p text:style-name="Text_20_body">Freigestellte Portraits</text:p>
        <text:p text:style-name="Text_20_body">eingebaut.</text:p>
        <text:p text:style-name="Text_20_body">Links Jacqueline.</text:p>
        <text:p text:style-name="Text_20_body">Rechts Asat.</text:p>
        <text:p text:style-name="Text_20_body">Weitere Bildfelder werden vorbereitet,</text:p>
        <text:p text:style-name="Text_20_body">damit später Fotos einfach ergänzt werden können.</text:p>
        <text:p text:style-name="Horizontal_20_Line"/>
        <text:h text:style-name="Heading_20_1" text:outline-level="1"><text:soft-page-break/>Gesamte Webseite</text:h>
        <text:p text:style-name="Text_20_body">Nach Über uns folgen:</text:p>
        <text:p text:style-name="Text_20_body">Kurse</text:p>
        <text:p text:style-name="Text_20_body">Long Range</text:p>
        <text:p text:style-name="Text_20_body">Sponsoren</text:p>
        <text:p text:style-name="Text_20_body">Kontakt</text:p>
        <text:p text:style-name="Text_20_body">Mitgliederbereich</text:p>
        <text:p text:style-name="Text_20_body">Shop</text:p>
        <text:p text:style-name="Text_20_body">Videos</text:p>
        <text:p text:style-name="Text_20_body">Academy</text:p>
        <text:p text:style-name="Text_20_body">Schritt für Schritt.</text:p>
        <text:p text:style-name="Text_20_body">Nicht alles gleichzeitig.</text:p>
        <text:p text:style-name="Horizontal_20_Line"/>
        <text:h text:style-name="Heading_20_1" text:outline-level="1">Was Guido besonders wichtig ist</text:h>
        <text:p text:style-name="Text_20_body">Die Webseite soll keine normale Sportschützen-Seite werden.</text:p>
        <text:p text:style-name="Text_20_body">Sie soll wirken wie eine Premium-Marke.</text:p>
        <text:p text:style-name="Text_20_body">Modern.</text:p>
        <text:p text:style-name="Text_20_body">Luxuriös.</text:p>
        <text:p text:style-name="Text_20_body">Professionell.</text:p>
        <text:p text:style-name="Text_20_body">Mit Wiedererkennungswert.</text:p>
        <text:p text:style-name="Text_20_body">Man soll sofort erkennen:</text:p>
        <text:p text:style-name="Text_20_body">Das ist</text:p>
        <text:p text:style-name="Text_20_body"><text:span text:style-name="Strong_20_Emphasis">Thorns On Target.</text:span></text:p>
        <text:p text:style-name="Horizontal_20_Line"/>
        <text:h text:style-name="Heading_20_1" text:outline-level="1">Morgen beginnen wir genau hier</text:h>
        <text:list xml:id="list4218803046970868251" text:style-name="L7">
          <text:list-item>
            <text:p text:style-name="P7"/>
          </text:list-item>
        </text:list>
        <text:p text:style-name="Text_20_body">VS Code mit GitHub verbinden.</text:p>
        <text:list xml:id="list8204470812682936613" text:style-name="L8">
          <text:list-item>
            <text:p text:style-name="P8"/>
          </text:list-item>
        </text:list>
        <text:p text:style-name="Text_20_body">GitHub richtig synchronisieren.</text:p>
        <text:list xml:id="list8175801647862356951" text:style-name="L9">
          <text:list-item>
            <text:p text:style-name="P9"/>
          </text:list-item>
        </text:list>
        <text:p text:style-name="Text_20_body">GitHub Pages korrekt veröffentlichen.</text:p>
        <text:list xml:id="list8109221980150152998" text:style-name="L10">
          <text:list-item>
            <text:p text:style-name="P10"/>
          </text:list-item>
        </text:list>
        <text:p text:style-name="Text_20_body">Danach die Über-uns-Seite fertigbauen.</text:p>
        <text:list xml:id="list6041344907638793638" text:style-name="L11">
          <text:list-item>
            <text:p text:style-name="P11"><text:soft-page-break/></text:p>
          </text:list-item>
        </text:list>
        <text:p text:style-name="Text_20_body">Design exakt an die Startseite anpassen.</text:p>
        <text:list xml:id="list2605838565372797261" text:style-name="L12">
          <text:list-item>
            <text:p text:style-name="P12"/>
          </text:list-item>
        </text:list>
        <text:p text:style-name="Text_20_body">Europameister deutlich hervorheben.</text:p>
        <text:list xml:id="list7868306104733641636" text:style-name="L13">
          <text:list-item>
            <text:p text:style-name="P13"/>
          </text:list-item>
        </text:list>
        <text:p text:style-name="Text_20_body">Goldene Karten.</text:p>
        <text:p text:style-name="Text_20_body">Goldene Linien.</text:p>
        <text:p text:style-name="Text_20_body">Premium-Look.</text:p>
        <text:list xml:id="list1506152817804726899" text:style-name="L14">
          <text:list-item>
            <text:p text:style-name="P14"/>
          </text:list-item>
        </text:list>
        <text:p text:style-name="Text_20_body">Bildplätze vorbereiten.</text:p>
        <text:list xml:id="list1716698178135849223" text:style-name="L15">
          <text:list-item>
            <text:p text:style-name="P15"/>
          </text:list-item>
        </text:list>
        <text:p text:style-name="Text_20_body">Danach erst weitere Seiten.</text:p>
        <text:p text:style-name="Horizontal_20_Line"/>
        <text:p text:style-name="Text_20_body">Ich wünsche dir einen schönen Abend, Guido. Wir haben heute einen großen Schritt gemacht: Die technische Basis steht, GitHub Pages läuft grundsätzlich, und wir haben die Richtung für das Design klar definiert. Morgen kümmern wir uns zuerst um die GitHub-Anbindung in VS Code und anschließend machen wir die <text:span text:style-name="Strong_20_Emphasis">Über-uns-Seite</text:span> zu einer Seite, die optisch und inhaltlich perfekt zur Startseite passt. Danach arbeiten wir uns Seite für Seite weiter vor.</text:p>
        <text:section text:style-name="Sect1" text:name="thread-bottom-container">
          <text:p text:style-name="Text_20_body"/>
          <text:section text:style-name="Sect1" text:name="thread-bottom">
            <text:p text:style-name="P16"><text:bookmark text:name="upload-files"/><draw:control text:anchor-type="as-char" draw:z-index="0" draw:style-name="gr1" draw:text-style-name="P20" svg:width="7.092cm" svg:height="0.927cm" draw:control="control1"/></text:p>
            <text:p text:style-name="P16"><draw:control text:anchor-type="as-char" draw:z-index="1" draw:style-name="gr1" draw:text-style-name="P21" svg:width="7.7cm" svg:height="1.43cm" draw:control="control2"/></text:p>
            <text:section text:style-name="Sect1" text:name="prompt-textarea">
              <text:p text:style-name="Text_20_body"/>
            </text:section>
            <text:section text:style-name="Sect1" text:name="_r_ne_">
              <text:p text:style-name="P16"/>
            </text:section>
            <text:section text:style-name="Sect1" text:name="_r_1ar_">
              <text:p text:style-name="P16"/>
            </text:section>
            <text:section text:style-name="Sect1" text:name="_r_1cg_">
              <text:p text:style-name="P16"/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do Graf-Jost</meta:initial-creator>
    <meta:creation-date>2026-06-22T15:45:40.09</meta:creation-date>
    <meta:document-statistic meta:table-count="0" meta:image-count="0" meta:object-count="0" meta:page-count="8" meta:paragraph-count="212" meta:word-count="665" meta:character-count="4989"/>
    <dc:date>2026-06-22T15:46:14.33</dc:date>
    <dc:creator>Guido Graf-Jost</dc:creator>
    <meta:editing-duration>PT34S</meta:editing-duration>
    <meta:editing-cycles>1</meta:editing-cycles>
    <meta:generator>OpenOffice/4.1.16$Win32 OpenOffice.org_project/4116m3$Build-9816</meta:generator>
  </office:meta>
</office:document-meta>
</file>