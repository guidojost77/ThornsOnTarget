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HORNS ON TARGET – Projektstand<text:line-break/>Stand: 15.06.2026</text:p>
      <text:h text:style-name="Heading_20_1" text:outline-level="1">==================================================<text:line-break/>AKTUELLER STAND</text:h>
      <text:p text:style-name="Text_20_body">Technische Basis:</text:p>
      <text:list xml:id="list192505079030343026" text:style-name="L1">
        <text:list-item>
          <text:p text:style-name="P1">VS Code installiert und funktionsfähig</text:p>
        </text:list-item>
        <text:list-item>
          <text:p text:style-name="P1">Live Server läuft</text:p>
        </text:list-item>
        <text:list-item>
          <text:p text:style-name="P1">Webseite lokal erreichbar</text:p>
        </text:list-item>
        <text:list-item>
          <text:p text:style-name="P1">Logo eingebunden</text:p>
        </text:list-item>
        <text:list-item>
          <text:p text:style-name="P1">Hero-Bereich erstellt</text:p>
        </text:list-item>
        <text:list-item>
          <text:p text:style-name="P1">Bild ASAT &amp; Jacqueline eingebunden</text:p>
        </text:list-item>
        <text:list-item>
          <text:p text:style-name="P1">PNG-Problem gelöst</text:p>
        </text:list-item>
        <text:list-item>
          <text:p text:style-name="P1">Transparenter Hintergrund funktioniert</text:p>
        </text:list-item>
        <text:list-item>
          <text:p text:style-name="P1">Aktuelle Bilddatei:</text:p>
        </text:list-item>
      </text:list>
      <text:p text:style-name="Text_20_body">Bilder/images/111.png</text:p>
      <text:h text:style-name="Heading_20_1" text:outline-level="1">==================================================<text:line-break/>WICHTIGE ERKENNTNISSE</text:h>
      <text:p text:style-name="Text_20_body">Das Problem der Startseite ist aktuell nicht das Bild.</text:p>
      <text:p text:style-name="Text_20_body">Das eigentliche Problem ist der Hero-Bereich.</text:p>
      <text:p text:style-name="Text_20_body">Die Seite zeigt momentan noch nicht ausreichend:</text:p>
      <text:list xml:id="list7828495046631064566" text:style-name="L2">
        <text:list-item>
          <text:p text:style-name="P2">Wer ASAT &amp; Jacqueline sind</text:p>
        </text:list-item>
        <text:list-item>
          <text:p text:style-name="P2">Welche Erfolge sie haben</text:p>
        </text:list-item>
        <text:list-item>
          <text:p text:style-name="P2">Welche Philosophie sie vertreten</text:p>
        </text:list-item>
        <text:list-item>
          <text:p text:style-name="P2">Warum man gerade bei ihnen trainieren sollte</text:p>
        </text:list-item>
      </text:list>
      <text:h text:style-name="Heading_20_1" text:outline-level="1"><text:soft-page-break/>==================================================<text:line-break/>ERKENNTNISSE AUS DEM FRAGENKATALOG</text:h>
      <text:p text:style-name="Text_20_body">Der Fragenkatalog wurde gelesen und ausgewertet.</text:p>
      <text:p text:style-name="Text_20_body">Schwerpunkte:</text:p>
      <text:list xml:id="list5678541085308769668" text:style-name="L3">
        <text:list-item>
          <text:p text:style-name="P3">Long Range</text:p>
        </text:list-item>
        <text:list-item>
          <text:p text:style-name="P3">Präzisionsschießen</text:p>
        </text:list-item>
        <text:list-item>
          <text:p text:style-name="P3">Wettkampftraining</text:p>
        </text:list-item>
        <text:list-item>
          <text:p text:style-name="P3">Schützenausbildung</text:p>
        </text:list-item>
        <text:list-item>
          <text:p text:style-name="P3">Praxisorientiertes Training</text:p>
        </text:list-item>
      </text:list>
      <text:p text:style-name="Horizontal_20_Line"/>
      <text:h text:style-name="Heading_20_2" text:outline-level="2">Besondere Philosophie</text:h>
      <text:p text:style-name="Text_20_body">ASAT und Jacqueline stehen NICHT für:</text:p>
      <text:list xml:id="list9141182517662962165" text:style-name="L4">
        <text:list-item>
          <text:p text:style-name="P4">Teure Profi-Ausrüstung</text:p>
        </text:list-item>
        <text:list-item>
          <text:p text:style-name="P4">Wiederladen als Pflicht</text:p>
        </text:list-item>
        <text:list-item>
          <text:p text:style-name="P4">Jahrelanges Munitions-Testen</text:p>
        </text:list-item>
        <text:list-item>
          <text:p text:style-name="P4">Materialschlacht</text:p>
        </text:list-item>
        <text:list-item>
          <text:p text:style-name="P4">Unnötig hohe Investitionen</text:p>
        </text:list-item>
      </text:list>
      <text:p text:style-name="Text_20_body">Sondern für:</text:p>
      <text:p text:style-name="Text_20_body">ERFOLG DURCH WISSEN STATT DURCH GELD</text:p>
      <text:p text:style-name="Text_20_body">Kernaussagen:</text:p>
      <text:list xml:id="list7500477180574424464" text:style-name="L5">
        <text:list-item>
          <text:p text:style-name="P5">Fabrikmunition nutzen</text:p>
        </text:list-item>
        <text:list-item>
          <text:p text:style-name="P5">Vorhandene Ausrüstung sinnvoll einsetzen</text:p>
        </text:list-item>
        <text:list-item>
          <text:p text:style-name="P5">Bezahlbare Zielfernrohre nutzen</text:p>
        </text:list-item>
        <text:list-item>
          <text:p text:style-name="P5">Mit normalen Mitteln erfolgreich werden</text:p>
        </text:list-item>
        <text:list-item>
          <text:p text:style-name="P5">Wissen und Technik sind wichtiger als Luxusausrüstung</text:p>
        </text:list-item>
      </text:list>
      <text:p text:style-name="Text_20_body">Leitsatz:</text:p>
      <text:p text:style-name="Text_20_body">"Man muss kein Wiederlader sein, um erfolgreich zu schießen."</text:p>
      <text:p text:style-name="Text_20_body">"Man muss keine 10.000-Euro-Ausrüstung besitzen."</text:p>
      <text:p text:style-name="Text_20_body">"Wissen, Technik und Training sind wichtiger als Luxusausrüstung."</text:p>
      <text:h text:style-name="Heading_20_1" text:outline-level="1"><text:soft-page-break/>==================================================<text:line-break/>DESIGN-ERKENNTNISSE</text:h>
      <text:p text:style-name="Text_20_body">Was Guido aktuell NICHT gefällt:</text:p>
      <text:list xml:id="list101591225905885236" text:style-name="L6">
        <text:list-item>
          <text:p text:style-name="P6">THORNS und TARGET untereinander</text:p>
        </text:list-item>
        <text:list-item>
          <text:p text:style-name="P6">Zu viel Leerraum</text:p>
        </text:list-item>
        <text:list-item>
          <text:p text:style-name="P6">Hero-Bereich wirkt leer</text:p>
        </text:list-item>
        <text:list-item>
          <text:p text:style-name="P6">Text wirkt hingestellt</text:p>
        </text:list-item>
        <text:list-item>
          <text:p text:style-name="P6">Schrift wirkt zu hart und zu weiß</text:p>
        </text:list-item>
        <text:list-item>
          <text:p text:style-name="P6">Bild wirkt momentan einfach eingesetzt</text:p>
        </text:list-item>
        <text:list-item>
          <text:p text:style-name="P6">Kleine Symbolleisten mit Emojis gefallen nicht</text:p>
        </text:list-item>
        <text:list-item>
          <text:p text:style-name="P6">Design wirkt noch nicht hochwertig genug</text:p>
        </text:list-item>
      </text:list>
      <text:p text:style-name="Horizontal_20_Line"/>
      <text:p text:style-name="Text_20_body">Was Guido gefällt:</text:p>
      <text:list xml:id="list4848392374408503519" text:style-name="L7">
        <text:list-item>
          <text:p text:style-name="P7">Schwarz-Gold-Farbschema</text:p>
        </text:list-item>
        <text:list-item>
          <text:p text:style-name="P7">Rundes Bild</text:p>
        </text:list-item>
        <text:list-item>
          <text:p text:style-name="P7">Dezenter Goldschein hinter dem Bild</text:p>
        </text:list-item>
        <text:list-item>
          <text:p text:style-name="P7">Grundsätzliche Designrichtung</text:p>
        </text:list-item>
      </text:list>
      <text:h text:style-name="Heading_20_1" text:outline-level="1">==================================================<text:line-break/>NÄCHSTER ARBEITSSCHRITT</text:h>
      <text:p text:style-name="Text_20_body">Hero-Bereich komplett überarbeiten.</text:p>
      <text:p text:style-name="Text_20_body">Ziele:</text:p>
      <text:list xml:id="list8061437449042232097" text:style-name="L8">
        <text:list-item>
          <text:p text:style-name="P8">THORNS ON TARGET in einer Zeile</text:p>
        </text:list-item>
      </text:list>
      <text:p text:style-name="Text_20_body">Nicht:</text:p>
      <text:p text:style-name="Text_20_body">THORNS<text:line-break/>ON TARGET</text:p>
      <text:p text:style-name="Text_20_body">Sondern:</text:p>
      <text:p text:style-name="Text_20_body">THORNS ON TARGET</text:p>
      <text:p text:style-name="Horizontal_20_Line"/>
      <text:list xml:id="list2099599319836541057" text:style-name="L9">
        <text:list-item>
          <text:p text:style-name="P9">Untertitel verbessern</text:p>
        </text:list-item>
      </text:list>
      <text:p text:style-name="Text_20_body">Beispiel:</text:p>
      <text:p text:style-name="Text_20_body"><text:soft-page-break/>LONG RANGE • WETTKAMPF • AUSBILDUNG</text:p>
      <text:p text:style-name="Horizontal_20_Line"/>
      <text:list xml:id="list2876607705872970255" text:style-name="L10">
        <text:list-item>
          <text:p text:style-name="P10">Philosophie integrieren</text:p>
        </text:list-item>
      </text:list>
      <text:p text:style-name="Text_20_body">Beispiel:</text:p>
      <text:p text:style-name="Text_20_body">Erfolg durch Wissen statt durch teure Ausrüstung.</text:p>
      <text:p text:style-name="Text_20_body">oder</text:p>
      <text:p text:style-name="Text_20_body">Erfolgreich mit Fabrikmunition, vernünftiger Ausrüstung und bewährten Methoden.</text:p>
      <text:p text:style-name="Horizontal_20_Line"/>
      <text:list xml:id="list2755019580187679627" text:style-name="L11">
        <text:list-item>
          <text:p text:style-name="P11">Erfolgsbereich einbauen</text:p>
        </text:list-item>
      </text:list>
      <text:p text:style-name="Text_20_body">Mögliche Inhalte:</text:p>
      <text:list xml:id="list3744923032097146344" text:style-name="L12">
        <text:list-item>
          <text:p text:style-name="P12">Europameister</text:p>
        </text:list-item>
        <text:list-item>
          <text:p text:style-name="P12">Deutsche Meister</text:p>
        </text:list-item>
        <text:list-item>
          <text:p text:style-name="P12">Landesmeister</text:p>
        </text:list-item>
        <text:list-item>
          <text:p text:style-name="P12">Wettkampferfahrung</text:p>
        </text:list-item>
        <text:list-item>
          <text:p text:style-name="P12">Long-Range-Erfahrung</text:p>
        </text:list-item>
      </text:list>
      <text:h text:style-name="Heading_20_1" text:outline-level="1">==================================================<text:line-break/>FRAGENKATALOG</text:h>
      <text:p text:style-name="Text_20_body">Die wichtigsten Inhalte wurden bereits ausgewertet.</text:p>
      <text:p text:style-name="Text_20_body">Falls später detailliert gearbeitet wird an:</text:p>
      <text:list xml:id="list5168638511858336900" text:style-name="L13">
        <text:list-item>
          <text:p text:style-name="P13">Kursen</text:p>
        </text:list-item>
        <text:list-item>
          <text:p text:style-name="P13">Sponsoren</text:p>
        </text:list-item>
        <text:list-item>
          <text:p text:style-name="P13">Über-uns-Seite</text:p>
        </text:list-item>
        <text:list-item>
          <text:p text:style-name="P13">Trainerprofilen</text:p>
        </text:list-item>
      </text:list>
      <text:p text:style-name="Text_20_body">sollte der Fragenkatalog gegebenenfalls noch einmal hochgeladen werden.</text:p>
      <text:h text:style-name="Heading_20_1" text:outline-level="1">==================================================<text:line-break/>FORTSETZUNG</text:h>
      <text:p text:style-name="Text_20_body">Beim nächsten Treffen:</text:p>
      <text:p text:style-name="Text_20_body">Hero-Bereich neu gestalten<text:line-break/>→ Philosophie integrieren<text:line-break/>→ Erfolgsbereich aufbauen<text:line-break/>→ Startseite professionell fertigstellen</text:p>
      <text:p text:style-name="Text_20_body"><text:soft-page-break/>Projektname:</text:p>
      <text:p text:style-name="Text_20_body">THORNS ON TARGET</text:p>
      <text:p text:style-name="Text_20_body">Stand gesichert am:</text:p>
      <text:p text:style-name="Text_20_body">15.06.2026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do Graf-Jost</meta:initial-creator>
    <meta:creation-date>2026-06-15T18:14:54.28</meta:creation-date>
    <meta:document-statistic meta:table-count="0" meta:image-count="0" meta:object-count="0" meta:page-count="5" meta:paragraph-count="101" meta:word-count="397" meta:character-count="3162"/>
    <dc:date>2026-06-15T18:15:17.27</dc:date>
    <dc:creator>Guido Graf-Jost</dc:creator>
    <meta:editing-duration>PT23S</meta:editing-duration>
    <meta:editing-cycles>1</meta:editing-cycles>
    <meta:generator>OpenOffice/4.1.16$Win32 OpenOffice.org_project/4116m3$Build-9816</meta:generator>
  </office:meta>
</office:document-meta>
</file>